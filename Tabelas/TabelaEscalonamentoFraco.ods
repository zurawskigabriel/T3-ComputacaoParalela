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 style:parent-style-name="Default">
      <style:graphic-properties draw:stroke="none" draw:fill="none" draw:ole-draw-aspect="1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9.284cm" svg:height="21.463cm" svg:x="1.929cm" svg:y="11.465cm">
            <draw:object draw:notify-on-update-of-ranges="'Sheet 1 - Table 1'.B6:'Sheet 1 - Table 1'.B11 'Sheet 1 - Table 1'.G5:'Sheet 1 - Table 1'.G5 'Sheet 1 - Table 1'.G6:'Sheet 1 - Table 1'.G11 'Sheet 1 - Table 1'.E5:'Sheet 1 - Table 1'.E5 'Sheet 1 - Table 1'.E6:'Sheet 1 - Table 1'.E11 'Sheet 1 - Table 1'.F5:'Sheet 1 - Table 1'.F5 'Sheet 1 - Table 1'.F6:'Sheet 1 - Table 1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2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1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Sequencial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101" calcext:value-type="float">
            <text:p>101</text:p>
          </table:table-cell>
          <table:table-cell table:style-name="ce8" office:value-type="float" office:value="1" calcext:value-type="float">
            <text:p>1,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E6]/[.B6])" office:value-type="float" office:value="1" calcext:value-type="float">
            <text:p>1,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float" office:value="117" calcext:value-type="float">
            <text:p>117</text:p>
          </table:table-cell>
          <table:table-cell table:style-name="ce8" table:formula="of:=([.D6]/[.D7])" office:value-type="float" office:value="0.863247863247863" calcext:value-type="float">
            <text:p>0,9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E7]/[.B7])" office:value-type="float" office:value="0.431623931623932" calcext:value-type="float">
            <text:p>0,4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7" office:value-type="float" office:value="138" calcext:value-type="float">
            <text:p>138</text:p>
          </table:table-cell>
          <table:table-cell table:style-name="ce8" table:formula="of:=([.D6]/[.D8])" office:value-type="float" office:value="0.731884057971015" calcext:value-type="float">
            <text:p>0,7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E8]/[.B8])" office:value-type="float" office:value="0.182971014492754" calcext:value-type="float">
            <text:p>0,2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7" office:value-type="float" office:value="162" calcext:value-type="float">
            <text:p>162</text:p>
          </table:table-cell>
          <table:table-cell table:style-name="ce8" table:formula="of:=([.D6]/[.D9])" office:value-type="float" office:value="0.623456790123457" calcext:value-type="float">
            <text:p>0,6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E9]/[.B9])" office:value-type="float" office:value="0.0779320987654321" calcext:value-type="float">
            <text:p>0,1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7" office:value-type="float" office:value="180" calcext:value-type="float">
            <text:p>180</text:p>
          </table:table-cell>
          <table:table-cell table:style-name="ce8" table:formula="of:=([.D6]/[.D10])" office:value-type="float" office:value="0.561111111111111" calcext:value-type="float">
            <text:p>0,6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([.E10]/[.B10])" office:value-type="float" office:value="0.0350694444444444" calcext:value-type="float">
            <text:p>0,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2" calcext:value-type="float">
            <text:p>32</text:p>
          </table:table-cell>
          <table:table-cell table:style-name="ce6"/>
          <table:table-cell table:style-name="ce7" office:value-type="float" office:value="180" calcext:value-type="float">
            <text:p>180</text:p>
          </table:table-cell>
          <table:table-cell table:style-name="ce8" table:formula="of:=([.D6]/[.D11])" office:value-type="float" office:value="0.561111111111111" calcext:value-type="float">
            <text:p>0,6</text:p>
          </table:table-cell>
          <table:table-cell table:style-name="ce9" office:value-type="float" office:value="32" calcext:value-type="float">
            <text:p>32</text:p>
          </table:table-cell>
          <table:table-cell table:style-name="ce8" table:formula="of:=([.E11]/[.B11])" office:value-type="float" office:value="0.0175347222222222" calcext:value-type="float">
            <text:p>0,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6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1"/>
          <table:table-cell table:number-columns-repeated="1013"/>
        </table:table-row>
        <table:table-row table:style-name="ro4" table:number-rows-repeated="1048552">
          <table:table-cell table:number-columns-repeated="1025"/>
        </table:table-row>
        <table:table-row table:style-name="ro4">
          <table:table-cell table:number-columns-repeated="1025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time-style style:name="N10160" number:language="en" number:country="US">
      <number:minutes number:style="long"/>
      <number:text>:</number:text>
      <number:seconds number:style="long"/>
    </number:time-style>
    <number:time-style style:name="N1016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2" number:language="en" number:country="US">
      <number:minutes number:style="long"/>
      <number:text>:</number:text>
      <number:seconds number:style="long" number:decimal-places="1"/>
    </number:time-style>
    <number:number-style style:name="N10163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17:28:02.505242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10-23T12:26:45</meta:creation-date>
    <dc:date>2026-06-02T19:34:55.830414797</dc:date>
    <meta:generator>LibreOffice/26.2.3.2$Linux_X86_64 LibreOffice_project/d4d5ed47b6084125f28d269a5650105d54dde034</meta:generator>
    <meta:editing-duration>PT3H4M26S</meta:editing-duration>
    <meta:editing-cycles>4</meta:editing-cycles>
    <meta:document-statistic meta:table-count="1" meta:cell-count="38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116">
      <number:number number:decimal-places="1" number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16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16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16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16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  <style:style style:name="T1" style:family="text">
      <style:text-properties fo:color="#000000" style:text-position="0% 100%" fo:font-family="'Helvetica Neue'" fo:font-size="24pt" fo:font-weight="bold" style:letter-kerning="false" style:font-family-asian="'Helvetica Neue'" style:font-size-asian="24pt" style:font-weight-asian="bold" style:font-family-complex="'Helvetica Neue'" style:font-size-complex="24pt" style:font-weight-complex="bold"/>
    </style:style>
    <style:style style:name="T2" style:family="text"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</office:automatic-styles>
  <office:body>
    <office:chart>
      <chart:chart svg:width="29.285cm" svg:height="21.464cm" xlink:href=".." xlink:type="simple" chart:class="chart:bar" chart:style-name="ch1">
        <chart:title svg:x="9.4cm" svg:y="0.095cm" chart:style-name="ch2">
          <text:p><text:span text:style-name="T1">Escalonamento Fraco</text:span></text:p>
        </chart:title>
        <chart:legend chart:legend-position="end" svg:x="7.061cm" svg:y="20.436cm" style:legend-expansion="custom" svg:width="14.34cm" svg:height="0.937cm" style:legend-expansion-aspect-ratio="15.3041622198506" chart:style-name="ch3"/>
        <chart:plot-area chart:style-name="ch4" svg:x="2.144cm" svg:y="1.742cm" svg:width="23.729cm" svg:height="16.795cm">
          <chart:coordinate-region svg:x="3.032cm" svg:y="2.007cm" svg:width="22.179cm" svg:height="15.751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2.525cm" svg:y="18.791cm" chart:style-name="ch7">
              <text:p><text:span text:style-name="T2">Núcleos</text:span></text:p>
            </chart:title>
          </chart:axis>
          <chart:axis chart:dimension="y" chart:name="primary-y" chart:style-name="ch8">
            <chart:title svg:x="25.995cm" svg:y="8.008cm" chart:style-name="ch7">
              <text:p><text:span text:style-name="T2">Eficiência</text:span></text:p>
            </chart:title>
          </chart:axis>
          <chart:axis chart:dimension="y" chart:name="secondary-y" chart:style-name="ch9">
            <chart:title svg:x="0.504cm" svg:y="12.133cm" chart:style-name="ch10">
              <text:p><text:span text:style-name="T2">Fator de Aceleração</text:span></text:p>
            </chart:title>
          </chart:axis>
          <chart:series chart:attached-axis="primary-y" chart:style-name="ch11" chart:values-cell-range-address="'Sheet 1 - Table 1'.G6:'Sheet 1 - Table 1'.G11" chart:label-cell-address="'Sheet 1 - Table 1'.G5:'Sheet 1 - Table 1'.G5" chart:class="chart:bar">
            <chart:data-point chart:repeated="6"/>
          </chart:series>
          <chart:series chart:attached-axis="secondary-y" chart:style-name="ch12" chart:values-cell-range-address="'Sheet 1 - Table 1'.E6:'Sheet 1 - Table 1'.E11" chart:label-cell-address="'Sheet 1 - Table 1'.E5:'Sheet 1 - Table 1'.E5" chart:class="chart:line">
            <chart:data-point chart:repeated="6"/>
          </chart:series>
          <chart:series chart:attached-axis="secondary-y" chart:style-name="ch13" chart:values-cell-range-address="'Sheet 1 - Table 1'.F6:'Sheet 1 - Table 1'.F11" chart:label-cell-address="'Sheet 1 - Table 1'.F5:'Sheet 1 - Table 1'.F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G5:'Sheet 1 - Table 1'.G5</svg:desc>
                </draw:g>
              </table:table-cell>
              <table:table-cell office:value-type="string">
                <text:p>Speed-Up</text:p>
                <draw:g>
                  <svg:desc>'Sheet 1 - Table 1'.E5:'Sheet 1 - Table 1'.E5</svg:desc>
                </draw:g>
              </table:table-cell>
              <table:table-cell office:value-type="string">
                <text:p>Speed-Up Ideal</text:p>
                <draw:g>
                  <svg:desc>'Sheet 1 - Table 1'.F5:'Sheet 1 - Table 1'.F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31623931623932">
                <text:p>0.431623931623932</text:p>
              </table:table-cell>
              <table:table-cell office:value-type="float" office:value="0.863247863247863">
                <text:p>0.863247863247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82971014492754">
                <text:p>0.182971014492754</text:p>
              </table:table-cell>
              <table:table-cell office:value-type="float" office:value="0.731884057971015">
                <text:p>0.7318840579710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79320987654321">
                <text:p>0.0779320987654321</text:p>
              </table:table-cell>
              <table:table-cell office:value-type="float" office:value="0.623456790123457">
                <text:p>0.6234567901234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50694444444444">
                <text:p>0.0350694444444444</text:p>
              </table:table-cell>
              <table:table-cell office:value-type="float" office:value="0.561111111111111">
                <text:p>0.5611111111111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75347222222222">
                <text:p>0.0175347222222222</text:p>
              </table:table-cell>
              <table:table-cell office:value-type="float" office:value="0.561111111111111">
                <text:p>0.561111111111111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